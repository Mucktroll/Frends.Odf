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Gabriel Dearden</meta:initial-creator>
    <dc:creator>Dearden Gabriel</dc:creator>
    <meta:creation-date>2015-06-05T18:17:20Z</meta:creation-date>
    <dc:date>2026-06-09T10:40:53Z</dc:date>
  </office:meta>
</office:document-meta>
</file>